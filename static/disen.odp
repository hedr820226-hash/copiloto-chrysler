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B00000330E6CF7AB7.png" manifest:media-type="image/png"/>
  <manifest:file-entry manifest:full-path="Pictures/100000010000019E000001CAAE4E7B6F.png" manifest:media-type="image/png"/>
  <manifest:file-entry manifest:full-path="Pictures/1000000000000320000005003843D22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9.34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Predeterminado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842cm" svg:height="15.749cm" svg:x="9.158cm" svg:y="1cm">
          <draw:image xlink:href="Pictures/1000000000000320000005003843D22D.jpg" xlink:type="simple" xlink:show="embed" xlink:actuate="onLoad" draw:mime-type="image/jpeg">
            <text:p/>
          </draw:image>
        </draw:frame>
        <draw:custom-shape draw:style-name="gr2" draw:text-style-name="P1" draw:layer="layout" svg:width="4.5cm" svg:height="2cm" svg:x="11.7cm" svg:y="13.3cm">
          <text:p text:style-name="P1">Espacio limpi usarl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842cm" svg:height="1.5cm" svg:x="9cm" svg:y="10.7cm">
          <text:p text:style-name="P1">Rpm velocidad volt temperatura un pco mas grandes 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42cm" svg:height="2cm" svg:x="9.158cm" svg:y="1.5cm">
          <draw:image xlink:href="Pictures/100000010000019E000001CAAE4E7B6F.png" xlink:type="simple" xlink:show="embed" xlink:actuate="onLoad" draw:mime-type="image/png">
            <text:p/>
          </draw:image>
        </draw:frame>
        <draw:frame draw:style-name="gr1" draw:text-style-name="P1" draw:layer="layout" svg:width="5.458cm" svg:height="2cm" svg:x="13.042cm" svg:y="1.5cm">
          <draw:image xlink:href="Pictures/10000001000004AB00000330E6CF7AB7.png" xlink:type="simple" xlink:show="embed" xlink:actuate="onLoad" draw:mime-type="image/png">
            <text:p/>
          </draw:image>
        </draw:frame>
        <draw:custom-shape draw:style-name="gr4" draw:text-style-name="P1" draw:layer="layout" svg:width="7.5cm" svg:height="1.5cm" svg:x="10.5cm" svg:y="4.5cm">
          <text:p text:style-name="P1">Est bajarlo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8:42:50.826410799</meta:creation-date>
    <dc:date>2026-05-05T18:52:15.545328385</dc:date>
    <meta:editing-duration>PT9M27S</meta:editing-duration>
    <meta:editing-cycles>1</meta:editing-cycles>
    <meta:document-statistic meta:object-count="29"/>
    <meta:generator>LibreOffice/26.2.3.2$Linux_X86_64 LibreOffice_project/70e089b17412e4cb7773e41413306b17a2328c34</meta:generator>
  </office:meta>
</office:document-meta>
</file>